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a2c" officeooo:paragraph-rsid="00135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MAIN</text:p>
      <text:p text:style-name="Standard"/>
      <text:p text:style-name="Standard">sudo nano /etc/nginx/sites-enabled/untamedprime</text:p>
      <text:p text:style-name="Standard"/>
      <text:p text:style-name="Standard"/>
      <text:p text:style-name="Standard"/>
      <text:p text:style-name="Standard">server {</text:p>
      <text:p text:style-name="Standard"><text:s text:c="4"/>listen 80;</text:p>
      <text:p text:style-name="Standard"><text:s text:c="4"/>server_name untamedprime.com www.untamedprime.com;</text:p>
      <text:p text:style-name="Standard"/>
      <text:p text:style-name="Standard"><text:s text:c="4"/>root /home/untamedprimal/UntamedPrimal/public;</text:p>
      <text:p text:style-name="Standard"><text:s text:c="4"/>index index.html;</text:p>
      <text:p text:style-name="Standard"/>
      <text:p text:style-name="Standard"><text:s text:c="4"/>location / {</text:p>
      <text:p text:style-name="Standard"><text:s text:c="8"/>try_files $uri $uri/ @upstream;</text:p>
      <text:p text:style-name="Standard"><text:s text:c="4"/>}</text:p>
      <text:p text:style-name="Standard"/>
      <text:p text:style-name="Standard"><text:s text:c="4"/>location @upstream {</text:p>
      <text:p text:style-name="Standard"><text:s text:c="8"/>proxy_pass http://127.0.0.1:3000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onnect_timeout 5s;</text:p>
      <text:p text:style-name="Standard"><text:s text:c="8"/>proxy_read_timeout 5s;</text:p>
      <text:p text:style-name="Standard"><text:s text:c="4"/>}</text:p>
      <text:p text:style-name="Standard"/>
      <text:p text:style-name="Standard"><text:s text:c="4"/>error_page 502 503 504 = /offline.html;</text:p>
      <text:p text:style-name="Standard"/>
      <text:p text:style-name="Standard"><text:s text:c="4"/>location = /offline.html {</text:p>
      <text:p text:style-name="Standard"><text:s text:c="8"/>root /home/untamedprimal/UntamedPrimal/public;</text:p>
      <text:p text:style-name="Standard"><text:s text:c="8"/>internal;</text:p>
      <text:p text:style-name="Standard"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6:50:56.117741306</meta:creation-date>
    <dc:date>2026-02-06T16:52:37.971126222</dc:date>
    <meta:editing-duration>PT1M42S</meta:editing-duration>
    <meta:editing-cycles>1</meta:editing-cycles>
    <meta:document-statistic meta:table-count="0" meta:image-count="0" meta:object-count="0" meta:page-count="1" meta:paragraph-count="25" meta:word-count="60" meta:character-count="746" meta:non-whitespace-character-count="587"/>
    <meta:generator>LibreOffice/7.3.7.2$Linux_X86_64 LibreOffice_project/30$Build-2</meta:generator>
  </office:meta>
</office:document-meta>
</file>